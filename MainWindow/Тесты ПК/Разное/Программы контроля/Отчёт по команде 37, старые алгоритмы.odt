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3cb371"/>
    </style:style>
    <style:style style:name="P2" style:family="paragraph" style:parent-style-name="Standard">
      <style:text-properties fo:color="#d2691e"/>
    </style:style>
    <style:style style:name="P3" style:family="paragraph" style:parent-style-name="Standard">
      <style:text-properties fo:color="#dcdcdc"/>
    </style:style>
    <style:style style:name="P4" style:family="paragraph" style:parent-style-name="Standard">
      <style:text-properties fo:color="#dcdcdc"/>
    </style:style>
    <style:style style:name="P5" style:family="paragraph" style:parent-style-name="Standard">
      <style:text-properties fo:color="#d2691e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style:use-window-font-color="true" fo:language="ru" fo:country="RU" officeooo:rsid="000491a4" officeooo:paragraph-rsid="0004c4c9"/>
    </style:style>
    <style:style style:name="P8" style:family="paragraph" style:parent-style-name="Standard">
      <style:text-properties style:use-window-font-color="true" fo:language="ru" fo:country="RU" officeooo:rsid="0004c4c9" officeooo:paragraph-rsid="0004c4c9"/>
    </style:style>
    <style:style style:name="P9" style:family="paragraph" style:parent-style-name="Standard">
      <style:text-properties style:use-window-font-color="true" style:font-name="Liberation Mono"/>
    </style:style>
    <style:style style:name="T1" style:family="text">
      <style:text-properties fo:color="#ffd700"/>
    </style:style>
    <style:style style:name="T2" style:family="text">
      <style:text-properties fo:color="#87cefa"/>
    </style:style>
    <style:style style:name="T3" style:family="text">
      <style:text-properties fo:color="#3cb371"/>
    </style:style>
    <style:style style:name="T4" style:family="text">
      <style:text-properties fo:color="#4b0082"/>
    </style:style>
    <style:style style:name="T5" style:family="text">
      <style:text-properties fo:color="#d2691e"/>
    </style:style>
    <style:style style:name="T6" style:family="text">
      <style:text-properties officeooo:rsid="0004c4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Отчёт о проверке следующих данных: Загрузка <text:span text:style-name="T6">4</text:span> мс, анализ <text:span text:style-name="T6">462</text:span> мс.</text:p>
      <text:p text:style-name="P7"><text:span text:style-name="T6">Старый</text:span> алгоритм распознавания</text:p>
      <text:p text:style-name="P8">Анализировались только команды ОК, СП, РМ, КЦ</text:p>
      <text:p text:style-name="P6"/>
      <text:p text:style-name="P9"><text:s text:c="12"/>{ Программа электроконтроля кабеля }</text:p>
      <text:p text:style-name="P9"><text:s text:c="12"/>{ <text:s text:c="6"/>ИМНЕ.685611.219 <text:s text:c="11"/>}</text:p>
      <text:p text:style-name="P9"/>
      <text:p text:style-name="P9">10 ОК <text:s text:c="3"/>ИМНЕ.685611.219 * Кабель</text:p>
      <text:p text:style-name="P9"><text:s text:c="9"/>ОПК <text:s text:c="2"/>=ИМНЕ.685611.219ПМ102</text:p>
      <text:p text:style-name="P9"><text:s text:c="9"/>ЗАКАЗ =049</text:p>
      <text:p text:style-name="P9"><text:s text:c="9"/>ЦЕХ <text:s text:c="2"/>=58</text:p>
      <text:p text:style-name="P9"><text:s text:c="9"/>ИК <text:s text:c="3"/>=АСК-МКИ</text:p>
      <text:p text:style-name="P9"><text:s text:c="9"/>КД <text:s text:c="3"/>=ИМНЕ.685611.219ПЭ3</text:p>
      <text:p text:style-name="P9"><text:s text:c="9"/>КД <text:s text:c="3"/>=ИМНЕ.685611.219Э3</text:p>
      <text:p text:style-name="P9"><text:s text:c="9"/>КД <text:s text:c="3"/>=N изв.ИМНЕ0088-08</text:p>
      <text:p text:style-name="P9"><text:s text:c="9"/>КД <text:s text:c="3"/>=ХД0.005.081ТУ</text:p>
      <text:p text:style-name="P9"><text:s text:c="9"/>Прим <text:s/>=22.03.2013</text:p>
      <text:p text:style-name="P9"/>
      <text:p text:style-name="P9">20 СП Соединители</text:p>
      <text:p text:style-name="P9"><text:s text:c="6"/>{x1} <text:s/>К1=СТ5258.060.000-1шт.{X4 <text:s/>6P100-X1,X2,X3} "БК1,2,3"</text:p>
      <text:p text:style-name="P9"><text:s text:c="6"/>{x2} <text:s/>K2=СТ5258.060.000 <text:s text:c="4"/>{x4 <text:s text:c="15"/>} "БК4,5,6"</text:p>
      <text:p text:style-name="P9"><text:s text:c="6"/>{x3} <text:s/>К3=СТ5258.060.000-1шт.{X4 <text:s text:c="15"/>} "БК7,8,9"</text:p>
      <text:p text:style-name="P9"><text:s text:c="6"/>{x4} <text:s/>КНП4=СТ5257.050.000 <text:s text:c="2"/>{X5 <text:s/>6P100-X3 <text:s text:c="5"/>} "БК10 <text:s text:c="2"/>"</text:p>
      <text:p text:style-name="P9"><text:s text:c="6"/>{x5} <text:s/>К5=СТ2533-290 <text:s text:c="8"/>{X3 <text:s/>6P100-X1 <text:s text:c="5"/>} "БК11 <text:s text:c="2"/>"</text:p>
      <text:p text:style-name="P9"><text:s text:c="6"/>{x6} <text:s/>КНП6=СТ5257.100.000 <text:s text:c="2"/>{X5 <text:s/>6P100-X2 <text:s text:c="5"/>} "БК12 <text:s text:c="2"/>"</text:p>
      <text:p text:style-name="P9"><text:s text:c="20"/>п=перемычка на корпус "1.6.100"</text:p>
      <text:p text:style-name="P9"/>
      <text:p text:style-name="P9">30 РМ Х1/А1-56=1.1.1-56 <text:s text:c="6"/>"БК1,2,3-Ст5258.060"</text:p>
      <text:p text:style-name="P9"><text:s text:c="6"/>Х1/В1-44=1.1.57-100</text:p>
      <text:p text:style-name="P9"><text:s text:c="6"/>Х1/В45-56=1.2.1-12</text:p>
      <text:p text:style-name="P9"><text:s text:c="6"/>Х1/С1-56=1.2.13-68</text:p>
      <text:p text:style-name="P9"><text:s text:c="6"/>Х1/D1-32=1.2.69-100</text:p>
      <text:p text:style-name="P9"><text:s text:c="6"/>Х1/D33-56=1.3.1-24</text:p>
      <text:p text:style-name="P9"/>
      <text:p text:style-name="P9"><text:s text:c="6"/>Х2/А1-56=1.4.1-56 <text:s text:c="7"/>"БК4,5,6-Ст5258.060"</text:p>
      <text:p text:style-name="P9"><text:s text:c="6"/>Х2/В1-44=1.4.57-100</text:p>
      <text:p text:style-name="P9"><text:s text:c="6"/>Х2/В45-56=1.5.1-12</text:p>
      <text:p text:style-name="P9"><text:s text:c="6"/>Х2/С1-56=1.5.13-68</text:p>
      <text:p text:style-name="P9"><text:s text:c="6"/>Х2/D1-32=1.5.69-100</text:p>
      <text:p text:style-name="P9"><text:s text:c="6"/>Х2/D33-56=1.6.1-24</text:p>
      <text:p text:style-name="P9"/>
      <text:p text:style-name="P9"><text:s text:c="6"/>Х3/А1-56=1.7.1-56 <text:s text:c="7"/>"БК7,8,9-Ст5258.060"</text:p>
      <text:p text:style-name="P9"><text:s text:c="6"/>Х3/В1-44=1.7.57-100</text:p>
      <text:p text:style-name="P9"><text:s text:c="6"/>Х3/В45-56=1.8.1-12</text:p>
      <text:p text:style-name="P9"><text:s text:c="6"/>Х3/С1-56=1.8.13-68</text:p>
      <text:p text:style-name="P9"><text:s text:c="6"/>Х3/D1-32=1.8.69-100</text:p>
      <text:p text:style-name="P9"><text:s text:c="6"/>Х3/D33-56=1.9.1-24</text:p>
      <text:p text:style-name="P9"/>
      <text:p text:style-name="P9"><text:s text:c="6"/>Х4/А1-30=1.10.25-54 <text:s text:c="6"/>"БК10-Ст5257.050"</text:p>
      <text:p text:style-name="P9"><text:s text:c="6"/>Х4/Б1-31=1.10.55-85</text:p>
      <text:p text:style-name="P9"/>
      <text:p text:style-name="P9"><text:s text:c="6"/>Х5/А1-30=1.11.1-30 <text:s text:c="5"/>"БК11-Ст2533-290"</text:p>
      <text:p text:style-name="P9"><text:s text:c="6"/>Х5/Б1-31=1.11.31-61</text:p>
      <text:p text:style-name="P9"><text:soft-page-break/></text:p>
      <text:p text:style-name="P9"><text:s text:c="6"/>Х6/А1-30=1.12.23-52 <text:s text:c="5"/>"БК12-Ст5257.100"</text:p>
      <text:p text:style-name="P9"><text:s text:c="6"/>Х6/Б1-31=1.12.53-83</text:p>
      <text:p text:style-name="P9"><text:s text:c="6"/>КОРПУС=1.6.100</text:p>
      <text:p text:style-name="P9"/>
      <text:p text:style-name="P9">34 ЦУ Проверка кабеля ИМНЕ.685611.219 до сборки?</text:p>
      <text:p text:style-name="P9"/>
      <text:p text:style-name="P9">35 УП 90 // Если нет то проверяем после сборки</text:p>
      <text:p text:style-name="P9"/>
      <text:p text:style-name="P9">40 <text:s/>ПР R&lt;10 Ом,C</text:p>
      <text:p text:style-name="P9"><text:s text:c="6"/>*X1/A1,X2/A1,X3/A1,X1/A56,X2/A56,X3/A56</text:p>
      <text:p text:style-name="P9"/>
      <text:p text:style-name="P9"><text:s text:c="6"/>*X1/B1,X1/B6,X1/B16,X1/B26,X1/B36,X1/B46,X1/B56,{1}</text:p>
      <text:p text:style-name="P9"><text:s text:c="7"/>X2/B1,X2/B6,X2/B16,X2/B26,X2/B36,X2/B46,X2/B56,</text:p>
      <text:p text:style-name="P9"><text:s text:c="7"/>X3/B1,X3/B6,X3/B16,X3/B26,X3/B36,X3/B46,X3/B56,</text:p>
      <text:p text:style-name="P9"><text:s text:c="7"/>X4/Б1,X4/Б11,X4/Б21,X4/Б31,</text:p>
      <text:p text:style-name="P9"><text:s text:c="7"/>X5/Б1,X5/Б11,X5/Б21,X5/Б31,</text:p>
      <text:p text:style-name="P9"><text:s text:c="7"/>X6/Б1,X6/Б11,X6/Б21,X6/Б31,</text:p>
      <text:p text:style-name="P9"><text:s text:c="6"/>X1/C1,X1/C11,X1/C21,X1/C31,X1/C41,X1/C51,X1/C56,{2}</text:p>
      <text:p text:style-name="P9"><text:s text:c="7"/>X1/C55,X1/D55,</text:p>
      <text:p text:style-name="P9"><text:s text:c="6"/>X2/C1,X2/C11,X2/C21,X2/C31,X2/C41,X2/C51,X2/C56,{2}</text:p>
      <text:p text:style-name="P9"><text:s text:c="7"/>X2/C55,X2/D55,</text:p>
      <text:p text:style-name="P9"><text:s text:c="6"/>X3/C1,X3/C11,X3/C21,X3/C31,X3/C41,X3/C51,X3/C56,{2}</text:p>
      <text:p text:style-name="P9"><text:s text:c="7"/>X3/C55,X3/D55</text:p>
      <text:p text:style-name="P9"/>
      <text:p text:style-name="P9"><text:s text:c="6"/>*X1/A3,X2/A3,X3/A3</text:p>
      <text:p text:style-name="P9"><text:s text:c="6"/>*X1/B3,X2/B3,X3/B3</text:p>
      <text:p text:style-name="P9"><text:s text:c="6"/>*X1/A4,X2/A4,X3/A4</text:p>
      <text:p text:style-name="P9"><text:s text:c="6"/>*X1/B4,X2/B4,X3/B4</text:p>
      <text:p text:style-name="P9"><text:s text:c="6"/>*X1/A5,X2/A5,X3/A5</text:p>
      <text:p text:style-name="P9"><text:s text:c="6"/>*X1/B5,X2/B5,X3/B5</text:p>
      <text:p text:style-name="P9"><text:s text:c="6"/>*X1/A6,X2/A6,X3/A6</text:p>
      <text:p text:style-name="P9"><text:s text:c="6"/>*X1/A7,X2/A7,X3/A7</text:p>
      <text:p text:style-name="P9"><text:s text:c="6"/>*X1/B7,X2/B7,X3/B7</text:p>
      <text:p text:style-name="P9"><text:s text:c="6"/>*X1/A8,X2/A8,X3/A8</text:p>
      <text:p text:style-name="P9"><text:s text:c="6"/>*X1/B8,X2/B8,X3/B8</text:p>
      <text:p text:style-name="P9"><text:s text:c="6"/>*X1/A9,X2/A9,X3/A9</text:p>
      <text:p text:style-name="P9"><text:s text:c="6"/>*X1/B9,X2/B9,X3/B9</text:p>
      <text:p text:style-name="P9"><text:s text:c="6"/>*X1/A10,X2/A10,X3/A10</text:p>
      <text:p text:style-name="P9"><text:s text:c="6"/>*X1/B10,X2/B10,X3/B10</text:p>
      <text:p text:style-name="P9"><text:s text:c="6"/>*X1/A11,X2/A11,X3/A11</text:p>
      <text:p text:style-name="P9"><text:s text:c="6"/>*X1/B11,X2/B11,X3/B11</text:p>
      <text:p text:style-name="P9"><text:s text:c="6"/>*X1/A12,X2/A12,X3/A12</text:p>
      <text:p text:style-name="P9"/>
      <text:p text:style-name="P9"/>
      <text:p text:style-name="P9"><text:s text:c="6"/>*X1/D1,X1/D56</text:p>
      <text:p text:style-name="P9"><text:s text:c="6"/>*X2/D1,X2/D56</text:p>
      <text:p text:style-name="P9"><text:s text:c="6"/>*X3/D1,X3/D56</text:p>
      <text:p text:style-name="P9"/>
      <text:p text:style-name="P9"><text:s text:c="6"/>*X1/C3,X2/C3,X3/C3</text:p>
      <text:p text:style-name="P9"><text:s text:c="6"/>*X1/D3,X2/D3,X3/D3</text:p>
      <text:p text:style-name="P9"><text:s text:c="6"/>*X1/C4,X2/C4,X3/C4</text:p>
      <text:p text:style-name="P9"><text:s text:c="6"/>*X1/D4,X2/D4,X3/D4</text:p>
      <text:p text:style-name="P9"><text:soft-page-break/><text:s text:c="6"/>*X1/C5,X2/C5,X3/C5</text:p>
      <text:p text:style-name="P9"><text:s text:c="6"/>*X1/D5,X2/D5,X3/D5</text:p>
      <text:p text:style-name="P9"><text:s text:c="6"/>*X1/C6,X2/C6,X3/C6</text:p>
      <text:p text:style-name="P9"><text:s text:c="6"/>*X1/D6,X2/D6,X3/D6</text:p>
      <text:p text:style-name="P9"><text:s text:c="6"/>*X1/C7,X2/C7,X3/C7</text:p>
      <text:p text:style-name="P9"><text:s text:c="6"/>*X1/D7,X2/D7,X3/D7</text:p>
      <text:p text:style-name="P9"><text:s text:c="6"/>*X1/C8,X2/C8,X3/C8</text:p>
      <text:p text:style-name="P9"><text:s text:c="6"/>*X1/D8,X2/D8,X3/D8</text:p>
      <text:p text:style-name="P9"><text:s text:c="6"/>*X1/C9,X2/C9,X3/C9</text:p>
      <text:p text:style-name="P9"><text:s text:c="6"/>*X1/D9,X2/D9,X3/D9</text:p>
      <text:p text:style-name="P9"><text:s text:c="6"/>*X1/C10,X2/C10,X3/C10</text:p>
      <text:p text:style-name="P9"><text:s text:c="6"/>*X1/D10,X2/D10,X3/D10</text:p>
      <text:p text:style-name="P9"><text:s text:c="6"/>*X1/D11,X2/D11,X3/D11</text:p>
      <text:p text:style-name="P9"><text:s text:c="6"/>*X1/C12,X2/C12,X3/C12</text:p>
      <text:p text:style-name="P9"/>
      <text:p text:style-name="P9">{ЛИСТ 2}</text:p>
      <text:p text:style-name="P9"><text:s text:c="6"/>*X1/B12,X2/B12,X3/B12</text:p>
      <text:p text:style-name="P9"><text:s text:c="6"/>*X1/A13,X2/A13,X3/A13</text:p>
      <text:p text:style-name="P9"><text:s text:c="6"/>*X1/B13,X2/B13,X3/B13</text:p>
      <text:p text:style-name="P9"><text:s text:c="6"/>*X1/A14,X2/A14,X3/A14</text:p>
      <text:p text:style-name="P9"><text:s text:c="6"/>*X1/B14,X2/B14,X3/B14</text:p>
      <text:p text:style-name="P9"><text:s text:c="6"/>*X1/A15,X2/A15,X3/A15</text:p>
      <text:p text:style-name="P9"><text:s text:c="6"/>*X1/B15,X2/B15,X3/B15</text:p>
      <text:p text:style-name="P9"><text:s text:c="6"/>*X1/A16,X2/A16,X3/A16</text:p>
      <text:p text:style-name="P9"><text:s text:c="6"/>*X1/A17,X2/A17,X3/A17</text:p>
      <text:p text:style-name="P9"><text:s text:c="6"/>*X1/B17,X2/B17,X3/B17</text:p>
      <text:p text:style-name="P9"><text:s text:c="6"/>*X1/A18,X2/A18,X3/A18</text:p>
      <text:p text:style-name="P9"><text:s text:c="6"/>*X1/B18,X2/B18,X3/B18</text:p>
      <text:p text:style-name="P9"><text:s text:c="6"/>*X1/A19,X2/A19,X3/A19</text:p>
      <text:p text:style-name="P9"><text:s text:c="6"/>*X1/B19,X2/B19,X3/B19</text:p>
      <text:p text:style-name="P9"><text:s text:c="6"/>*X1/A20,X2/A20,X3/A20</text:p>
      <text:p text:style-name="P9"><text:s text:c="6"/>*X1/B20,X2/B20,X3/B20</text:p>
      <text:p text:style-name="P9"><text:s text:c="6"/>*X1/A21,X2/A21,X3/A21</text:p>
      <text:p text:style-name="P9"><text:s text:c="6"/>*X1/B21,X2/B21,X3/B21</text:p>
      <text:p text:style-name="P9"><text:s text:c="6"/>*X1/A22,X2/A22,X3/A22</text:p>
      <text:p text:style-name="P9"><text:s text:c="6"/>*X1/B22,X2/B22,X3/B22</text:p>
      <text:p text:style-name="P9"><text:s text:c="6"/>*X1/A23,X2/A23,X3/A23</text:p>
      <text:p text:style-name="P9"><text:s text:c="6"/>*X1/B23,X2/B23,X3/B23</text:p>
      <text:p text:style-name="P9"><text:s text:c="6"/>*X1/A24,X2/A24,X3/A24</text:p>
      <text:p text:style-name="P9"><text:s text:c="6"/>*X1/B24,X2/B24,X3/B24</text:p>
      <text:p text:style-name="P9"><text:s text:c="6"/>*X1/A25,X2/A25,X3/A25</text:p>
      <text:p text:style-name="P9"><text:s text:c="6"/>*X1/B25,X2/B25,X3/B25</text:p>
      <text:p text:style-name="P9"><text:s text:c="6"/>*X1/A26,X2/A26,X3/A26</text:p>
      <text:p text:style-name="P9"><text:s text:c="6"/>*X1/A27,X2/A27,X3/A27</text:p>
      <text:p text:style-name="P9"/>
      <text:p text:style-name="P9"><text:s text:c="6"/>*X1/D12,X2/D12,X3/D12</text:p>
      <text:p text:style-name="P9"><text:s text:c="6"/>*X1/С13,X2/C13,X3/C13</text:p>
      <text:p text:style-name="P9"><text:s text:c="6"/>*X1/D13,X2/D13,X3/D13</text:p>
      <text:p text:style-name="P9"><text:s text:c="6"/>*X1/C14,X2/C14,X3/C14</text:p>
      <text:p text:style-name="P9"><text:s text:c="6"/>*X1/D14,X2/D14,X3/D14</text:p>
      <text:p text:style-name="P9"><text:s text:c="6"/>*X1/C15,X2/C15,X3/C15</text:p>
      <text:p text:style-name="P9"><text:s text:c="6"/>*X1/D15,X2/D15,X3/D15</text:p>
      <text:p text:style-name="P9"><text:s text:c="6"/>*X1/C16,X2/C16,X3/C16</text:p>
      <text:p text:style-name="P9"><text:soft-page-break/><text:s text:c="6"/>*X1/D16,X2/D16,X3/D16</text:p>
      <text:p text:style-name="P9"><text:s text:c="6"/>*X1/C17,X2/C17,X3/C17</text:p>
      <text:p text:style-name="P9"><text:s text:c="6"/>*X1/D17,X2/D17,X3/D17</text:p>
      <text:p text:style-name="P9"><text:s text:c="6"/>*X1/C18,X2/C18,X3/C18</text:p>
      <text:p text:style-name="P9"><text:s text:c="6"/>*X1/D18,X2/D18,X3/D18</text:p>
      <text:p text:style-name="P9"><text:s text:c="6"/>*X1/C19,X2/C19,X3/C19</text:p>
      <text:p text:style-name="P9"><text:s text:c="6"/>*X1/D19,X2/D19,X3/D19</text:p>
      <text:p text:style-name="P9"><text:s text:c="6"/>*X1/C20,X2/C20,X3/C20</text:p>
      <text:p text:style-name="P9"><text:s text:c="6"/>*X1/D20,X2/D20,X3/D20</text:p>
      <text:p text:style-name="P9"><text:s text:c="6"/>*X1/D21,X2/D21,X3/D21</text:p>
      <text:p text:style-name="P9"><text:s text:c="6"/>*X1/C22,X2/C22,X3/C22</text:p>
      <text:p text:style-name="P9"><text:s text:c="6"/>*X1/D22,X2/D22,X3/D22</text:p>
      <text:p text:style-name="P9"><text:s text:c="6"/>*X1/C23,X2/C23,X3/C23</text:p>
      <text:p text:style-name="P9"><text:s text:c="6"/>*X1/D23,X2/D23,X3/D23</text:p>
      <text:p text:style-name="P9"><text:s text:c="6"/>*X1/C24,X2/C24,X3/C24</text:p>
      <text:p text:style-name="P9"><text:s text:c="6"/>*X1/D24,X2/D24,X3/D24</text:p>
      <text:p text:style-name="P9"><text:s text:c="6"/>*X1/C25,X2/C25,X3/C25</text:p>
      <text:p text:style-name="P9"><text:s text:c="6"/>*X1/D25,X2/D25,X3/D25</text:p>
      <text:p text:style-name="P9"><text:s text:c="6"/>*X1/C26,X2/C26,X3/C26</text:p>
      <text:p text:style-name="P9"><text:s text:c="6"/>*X1/D26,X2/D26,X3/D26</text:p>
      <text:p text:style-name="P9"/>
      <text:p text:style-name="P9">{ЛИСТ 3}</text:p>
      <text:p text:style-name="P9"/>
      <text:p text:style-name="P9"><text:s text:c="6"/>*X1/B27,X2/B27,X3/B27</text:p>
      <text:p text:style-name="P9"><text:s text:c="6"/>*X1/A28,X2/A28,X3/A28</text:p>
      <text:p text:style-name="P9"><text:s text:c="6"/>*X1/B28,X2/B28,X3/B28</text:p>
      <text:p text:style-name="P9"><text:s text:c="6"/>*X1/A29,X2/A29,X3/A29</text:p>
      <text:p text:style-name="P9"><text:s text:c="6"/>*X1/B29,X2/B29,X3/B29</text:p>
      <text:p text:style-name="P9"><text:s text:c="6"/>*X1/A30,X2/A30,X3/A30</text:p>
      <text:p text:style-name="P9"><text:s text:c="6"/>*X1/B30,X2/B30,X3/B30</text:p>
      <text:p text:style-name="P9"><text:s text:c="6"/>*X1/A31,X2/A31,X3/A31</text:p>
      <text:p text:style-name="P9"><text:s text:c="6"/>*X1/B31,X2/B31,X3/B31</text:p>
      <text:p text:style-name="P9"><text:s text:c="6"/>*X1/A32,X2/A32,X3/A32</text:p>
      <text:p text:style-name="P9"><text:s text:c="6"/>*X1/B32,X2/B32,X3/B32</text:p>
      <text:p text:style-name="P9"><text:s text:c="6"/>*X1/A33,X2/A33,X3/A33</text:p>
      <text:p text:style-name="P9"/>
      <text:p text:style-name="P9"><text:s text:c="6"/>*X4/A1,X1/A2</text:p>
      <text:p text:style-name="P9"><text:s text:c="6"/>*X4/A2,X1/C2</text:p>
      <text:p text:style-name="P9"><text:s text:c="6"/>*X4/A30,X1/A55</text:p>
      <text:p text:style-name="P9"><text:s text:c="6"/>*X4/A29,X1/D51</text:p>
      <text:p text:style-name="P9"/>
      <text:p text:style-name="P9"><text:s text:c="6"/>*X5/A1,X2/A2</text:p>
      <text:p text:style-name="P9"><text:s text:c="6"/>*X5/A2,X2/C2</text:p>
      <text:p text:style-name="P9"><text:s text:c="6"/>*X5/A30,X2/A55</text:p>
      <text:p text:style-name="P9"><text:s text:c="6"/>*X5/A29,X2/D51</text:p>
      <text:p text:style-name="P9"/>
      <text:p text:style-name="P9"><text:s text:c="6"/>*X6/A1,X3/A2</text:p>
      <text:p text:style-name="P9"><text:s text:c="6"/>*X6/A2,X3/C2</text:p>
      <text:p text:style-name="P9"><text:s text:c="6"/>*X6/A30,X3/A55</text:p>
      <text:p text:style-name="P9"><text:s text:c="6"/>*X6/A29,X3/D51</text:p>
      <text:p text:style-name="P9"/>
      <text:p text:style-name="P9"><text:s text:c="6"/>*X1/С27,X2/C27,X3/C27</text:p>
      <text:p text:style-name="P9"><text:s text:c="6"/>*X1/D27,X2/D27,X3/D27</text:p>
      <text:p text:style-name="P9"><text:soft-page-break/><text:s text:c="6"/>*X1/C28,X2/C28,X3/C28</text:p>
      <text:p text:style-name="P9"><text:s text:c="6"/>*X1/D28,X2/D28,X3/D28</text:p>
      <text:p text:style-name="P9"><text:s text:c="6"/>*X1/C29,X2/C29,X3/C29</text:p>
      <text:p text:style-name="P9"><text:s text:c="6"/>*X1/D29,X2/D29,X3/D29</text:p>
      <text:p text:style-name="P9"><text:s text:c="6"/>*X1/C30,X2/C30,X3/C30</text:p>
      <text:p text:style-name="P9"><text:s text:c="6"/>*X1/D30,X2/D30,X3/D30</text:p>
      <text:p text:style-name="P9"><text:s text:c="6"/>*X1/D31,X2/D31,X3/D31</text:p>
      <text:p text:style-name="P9"><text:s text:c="6"/>*X1/C32,X2/C32,X3/C32</text:p>
      <text:p text:style-name="P9"><text:s text:c="6"/>*X1/D32,X2/D32,X3/D32</text:p>
      <text:p text:style-name="P9"><text:s text:c="6"/>*X1/C33,X2/C33,X3/C33</text:p>
      <text:p text:style-name="P9"><text:s text:c="6"/>*X1/D33,X2/D33,X3/D33</text:p>
      <text:p text:style-name="P9"><text:s text:c="6"/>*X1/C46,X2/C46,X3/C46</text:p>
      <text:p text:style-name="P9"><text:s text:c="6"/>*X1/D46,X2/D46,X3/D46</text:p>
      <text:p text:style-name="P9"><text:s text:c="6"/>*X1/C47,X2/C47,X3/C47</text:p>
      <text:p text:style-name="P9"><text:s text:c="6"/>*X1/D47,X2/D47,X3/D47</text:p>
      <text:p text:style-name="P9"><text:s text:c="6"/>*X1/C48,X2/C48,X3/C48</text:p>
      <text:p text:style-name="P9"><text:s text:c="6"/>*X1/D48,X2/D48,X3/D48</text:p>
      <text:p text:style-name="P9"><text:s text:c="6"/>*X1/C49,X2/C49,X3/C49</text:p>
      <text:p text:style-name="P9"><text:s text:c="6"/>*X1/D49,X2/D49,X3/D49</text:p>
      <text:p text:style-name="P9"><text:s text:c="6"/>*X1/C50,X2/C50,X3/C50</text:p>
      <text:p text:style-name="P9"><text:s text:c="6"/>*X1/D50,X2/D50,X3/D50,X4/A27,X5/A27,X6/A27</text:p>
      <text:p text:style-name="P9"><text:s text:c="6"/>*X1/D54,X2/D54,X3/D54</text:p>
      <text:p text:style-name="P9"><text:s text:c="6"/>*X1/C54,X2/C54,X3/C54</text:p>
      <text:p text:style-name="P9"><text:s text:c="6"/>*X1/C53,X2/C53,X3/C53</text:p>
      <text:p text:style-name="P9"/>
      <text:p text:style-name="P9">{ЛИСТ 4}</text:p>
      <text:p text:style-name="P9"/>
      <text:p text:style-name="P9"><text:s text:c="6"/>*X1/A47,X2/A47,X3/A47,X4/Б22,X5/Б22,X6/Б22</text:p>
      <text:p text:style-name="P9"><text:s text:c="6"/>*X1/B47,X2/B47,X3/B47,X4/Б23,X5/Б23,X6/Б23</text:p>
      <text:p text:style-name="P9"><text:s text:c="6"/>*X1/A48,X2/A48,X3/A48,X4/Б24,X5/Б24,X6/Б24</text:p>
      <text:p text:style-name="P9"><text:s text:c="6"/>*X1/B48,X2/B48,X3/B48,X4/Б25,X5/Б25,X6/Б25</text:p>
      <text:p text:style-name="P9"><text:s text:c="6"/>*X1/A49,X2/A49,X3/A49,X4/Б26,X5/Б26,X6/Б26</text:p>
      <text:p text:style-name="P9"><text:s text:c="6"/>*X1/B49,X2/B49,X3/B49,X4/Б27,X5/Б27,X6/Б27</text:p>
      <text:p text:style-name="P9"/>
      <text:p text:style-name="P9"><text:s text:c="6"/>*X1/B43,X4/A21</text:p>
      <text:p text:style-name="P9"><text:s text:c="6"/>*X1/A44,X4/A22</text:p>
      <text:p text:style-name="P9"><text:s text:c="6"/>*X1/B44,X4/A23</text:p>
      <text:p text:style-name="P9"><text:s text:c="6"/>*X1/B45,X4/A24</text:p>
      <text:p text:style-name="P9"><text:s text:c="6"/>*X1/D45,X4/A25</text:p>
      <text:p text:style-name="P9"><text:s text:c="6"/>*X1/A46,X4/A26</text:p>
      <text:p text:style-name="P9"/>
      <text:p text:style-name="P9"><text:s text:c="6"/>*X1/D53,X4/A28</text:p>
      <text:p text:style-name="P9"><text:s text:c="6"/>*X1/A52,X4/Б28</text:p>
      <text:p text:style-name="P9"><text:s text:c="6"/>*X1/B52,X4/Б29</text:p>
      <text:p text:style-name="P9"><text:s text:c="6"/>*X1/A53,X4/Б30</text:p>
      <text:p text:style-name="P9"/>
      <text:p text:style-name="P9"><text:s text:c="6"/>*X2/B43,X5/A21</text:p>
      <text:p text:style-name="P9"><text:s text:c="6"/>*X2/A44,X5/A22</text:p>
      <text:p text:style-name="P9"><text:s text:c="6"/>*X2/B44,X5/A23</text:p>
      <text:p text:style-name="P9"><text:s text:c="6"/>*X2/B45,X5/A24</text:p>
      <text:p text:style-name="P9"><text:s text:c="6"/>*X2/D45,X5/A25</text:p>
      <text:p text:style-name="P9"><text:s text:c="6"/>*X2/A46,X5/A26</text:p>
      <text:p text:style-name="P9"/>
      <text:p text:style-name="P9"><text:soft-page-break/><text:s text:c="6"/>*X2/D53,X5/A28</text:p>
      <text:p text:style-name="P9"><text:s text:c="6"/>*X2/A52,X5/Б28</text:p>
      <text:p text:style-name="P9"><text:s text:c="6"/>*X2/B52,X5/Б29</text:p>
      <text:p text:style-name="P9"><text:s text:c="6"/>*X2/A53,X5/Б30</text:p>
      <text:p text:style-name="P9"/>
      <text:p text:style-name="P9"><text:s text:c="6"/>*X3/B43,X6/A21</text:p>
      <text:p text:style-name="P9"><text:s text:c="6"/>*X3/A44,X6/A22</text:p>
      <text:p text:style-name="P9"><text:s text:c="6"/>*X3/B44,X6/A23</text:p>
      <text:p text:style-name="P9"><text:s text:c="6"/>*X3/B45,X6/A24</text:p>
      <text:p text:style-name="P9"><text:s text:c="6"/>*X3/D45,X6/A25</text:p>
      <text:p text:style-name="P9"><text:s text:c="6"/>*X3/A46,X6/A26</text:p>
      <text:p text:style-name="P9"/>
      <text:p text:style-name="P9"><text:s text:c="6"/>*X3/D53,X6/A28</text:p>
      <text:p text:style-name="P9"><text:s text:c="6"/>*X3/A52,X6/Б28</text:p>
      <text:p text:style-name="P9"><text:s text:c="6"/>*X3/B52,X6/Б29</text:p>
      <text:p text:style-name="P9"><text:s text:c="6"/>*X3/A53,X6/Б30</text:p>
      <text:p text:style-name="P9"/>
      <text:p text:style-name="P9"><text:s text:c="6"/>*X1/A34,X4/A3</text:p>
      <text:p text:style-name="P9"><text:s text:c="6"/>*X1/B34,X4/A4</text:p>
      <text:p text:style-name="P9"><text:s text:c="6"/>*X1/A35,X4/A5</text:p>
      <text:p text:style-name="P9"><text:s text:c="6"/>*X1/B35,X4/A6</text:p>
      <text:p text:style-name="P9"><text:s text:c="6"/>*X1/A36,X4/A7</text:p>
      <text:p text:style-name="P9"><text:s text:c="6"/>*X1/A37,X4/A8</text:p>
      <text:p text:style-name="P9"><text:s text:c="6"/>*X1/B37,X4/A9</text:p>
      <text:p text:style-name="P9"><text:s text:c="6"/>*X1/A38,X4/A10</text:p>
      <text:p text:style-name="P9"><text:s text:c="6"/>*X1/a39,X4/A12</text:p>
      <text:p text:style-name="P9"><text:s text:c="6"/>*X1/b39,X4/A13</text:p>
      <text:p text:style-name="P9"><text:s text:c="6"/>*X1/a40,X4/A14</text:p>
      <text:p text:style-name="P9"><text:s text:c="6"/>*X1/b40,X4/A15</text:p>
      <text:p text:style-name="P9"><text:s text:c="6"/>*X1/a41,X4/A16</text:p>
      <text:p text:style-name="P9"><text:s text:c="6"/>*X1/b41,X4/A17</text:p>
      <text:p text:style-name="P9"><text:s text:c="6"/>*X1/a42,X4/A18</text:p>
      <text:p text:style-name="P9"><text:s text:c="6"/>*X1/b42,X4/A19</text:p>
      <text:p text:style-name="P9"><text:s text:c="6"/>*X1/C34,X4/Б2</text:p>
      <text:p text:style-name="P9"><text:s text:c="6"/>*X1/D34,X4/Б3</text:p>
      <text:p text:style-name="P9"><text:s text:c="6"/>*X1/C35,X4/Б4</text:p>
      <text:p text:style-name="P9"><text:s text:c="6"/>*X1/D35,X4/Б5</text:p>
      <text:p text:style-name="P9"><text:s text:c="6"/>*X1/C36,X4/Б6</text:p>
      <text:p text:style-name="P9"><text:s text:c="6"/>*X1/D36,X4/Б7</text:p>
      <text:p text:style-name="P9"><text:s text:c="6"/>*X1/C37,X4/Б8</text:p>
      <text:p text:style-name="P9"><text:s text:c="6"/>*X1/D37,X4/Б9</text:p>
      <text:p text:style-name="P9"><text:s text:c="6"/>*X1/D38,X4/Б12</text:p>
      <text:p text:style-name="P9"><text:s text:c="6"/>*X1/C39,X4/Б13</text:p>
      <text:p text:style-name="P9"><text:s text:c="6"/>*X1/D39,X4/Б14</text:p>
      <text:p text:style-name="P9"><text:s text:c="6"/>*X1/C40,X4/Б15</text:p>
      <text:p text:style-name="P9"><text:s text:c="6"/>*X1/D40,X4/Б16</text:p>
      <text:p text:style-name="P9"><text:s text:c="6"/>*X1/D41,X4/Б17</text:p>
      <text:p text:style-name="P9"><text:s text:c="6"/>*X1/C42,X4/Б18</text:p>
      <text:p text:style-name="P9"><text:s text:c="6"/>*X1/D42,X4/Б19</text:p>
      <text:p text:style-name="P9"><text:s text:c="6"/>*X1/B38,X4/A11</text:p>
      <text:p text:style-name="P9"><text:s text:c="6"/>*X1/A43,X4/A20</text:p>
      <text:p text:style-name="P9"><text:s text:c="6"/>*X1/C38,X4/Б10</text:p>
      <text:p text:style-name="P9"><text:s text:c="6"/>*X1/C43,X4/Б20</text:p>
      <text:p text:style-name="P9"><text:soft-page-break/></text:p>
      <text:p text:style-name="P9"><text:s text:c="6"/>*X2/A34,X5/A3</text:p>
      <text:p text:style-name="P9"><text:s text:c="6"/>*X2/B34,X5/A4</text:p>
      <text:p text:style-name="P9"><text:s text:c="6"/>*X2/A35,X5/A5</text:p>
      <text:p text:style-name="P9"><text:s text:c="6"/>*X2/B35,X5/A6</text:p>
      <text:p text:style-name="P9"><text:s text:c="6"/>*X2/A36,X5/A7</text:p>
      <text:p text:style-name="P9"><text:s text:c="6"/>*X2/A37,X5/A8</text:p>
      <text:p text:style-name="P9"><text:s text:c="6"/>*X2/B37,X5/A9</text:p>
      <text:p text:style-name="P9"><text:s text:c="6"/>*X2/A38,X5/A10</text:p>
      <text:p text:style-name="P9"><text:s text:c="6"/>*X2/a39,X5/A12</text:p>
      <text:p text:style-name="P9"><text:s text:c="6"/>*X2/b39,X5/A13</text:p>
      <text:p text:style-name="P9"><text:s text:c="6"/>*X2/a40,X5/A14</text:p>
      <text:p text:style-name="P9"><text:s text:c="6"/>*X2/b40,X5/A15</text:p>
      <text:p text:style-name="P9"><text:s text:c="6"/>*X2/a41,X5/A16</text:p>
      <text:p text:style-name="P9"><text:s text:c="6"/>*X2/b41,X5/A17</text:p>
      <text:p text:style-name="P9"><text:s text:c="6"/>*X2/a42,X5/A18</text:p>
      <text:p text:style-name="P9"><text:s text:c="6"/>*X2/b42,X5/A19</text:p>
      <text:p text:style-name="P9"><text:s text:c="6"/>*X2/C34,X5/Б2</text:p>
      <text:p text:style-name="P9"><text:s text:c="6"/>*X2/D34,X5/Б3</text:p>
      <text:p text:style-name="P9"><text:s text:c="6"/>*X2/C35,X5/Б4</text:p>
      <text:p text:style-name="P9"><text:s text:c="6"/>*X2/D35,X5/Б5</text:p>
      <text:p text:style-name="P9"><text:s text:c="6"/>*X2/C36,X5/Б6</text:p>
      <text:p text:style-name="P9"><text:s text:c="6"/>*X2/D36,X5/Б7</text:p>
      <text:p text:style-name="P9"><text:s text:c="6"/>*X2/C37,X5/Б8</text:p>
      <text:p text:style-name="P9"><text:s text:c="6"/>*X2/D37,X5/Б9</text:p>
      <text:p text:style-name="P9"><text:s text:c="6"/>*X2/D38,X5/Б12</text:p>
      <text:p text:style-name="P9"><text:s text:c="6"/>*X2/C39,X5/Б13</text:p>
      <text:p text:style-name="P9"><text:s text:c="6"/>*X2/D39,X5/Б14</text:p>
      <text:p text:style-name="P9"><text:s text:c="6"/>*X2/C40,X5/Б15</text:p>
      <text:p text:style-name="P9"><text:s text:c="6"/>*X2/D40,X5/Б16</text:p>
      <text:p text:style-name="P9"><text:s text:c="6"/>*X2/D41,X5/Б17</text:p>
      <text:p text:style-name="P9"><text:s text:c="6"/>*X2/C42,X5/Б18</text:p>
      <text:p text:style-name="P9"><text:s text:c="6"/>*X2/D42,X5/Б19</text:p>
      <text:p text:style-name="P9"><text:s text:c="6"/>*X2/B38,X5/A11</text:p>
      <text:p text:style-name="P9"><text:s text:c="6"/>*X2/A43,X5/A20</text:p>
      <text:p text:style-name="P9"><text:s text:c="6"/>*X2/C38,X5/Б10</text:p>
      <text:p text:style-name="P9"><text:s text:c="6"/>*X2/C43,X5/Б20</text:p>
      <text:p text:style-name="P9"/>
      <text:p text:style-name="P9"/>
      <text:p text:style-name="P9"><text:s text:c="6"/>*X3/A34,X6/A3</text:p>
      <text:p text:style-name="P9"><text:s text:c="6"/>*X3/B34,X6/A4</text:p>
      <text:p text:style-name="P9"><text:s text:c="6"/>*X3/A35,X6/A5</text:p>
      <text:p text:style-name="P9"><text:s text:c="6"/>*X3/B35,X6/A6</text:p>
      <text:p text:style-name="P9"><text:s text:c="6"/>*X3/A36,X6/A7</text:p>
      <text:p text:style-name="P9"><text:s text:c="6"/>*X3/A37,X6/A8</text:p>
      <text:p text:style-name="P9"><text:s text:c="6"/>*X3/B37,X6/A9</text:p>
      <text:p text:style-name="P9"><text:s text:c="6"/>*X3/A38,X6/A10</text:p>
      <text:p text:style-name="P9"><text:s text:c="6"/>*X3/а39,X6/A12</text:p>
      <text:p text:style-name="P9"><text:s text:c="6"/>*X3/в39,X6/A13</text:p>
      <text:p text:style-name="P9"><text:s text:c="6"/>*X3/a40,X6/A14</text:p>
      <text:p text:style-name="P9"><text:s text:c="6"/>*X3/b40,X6/A15</text:p>
      <text:p text:style-name="P9"><text:s text:c="6"/>*X3/a41,X6/A16</text:p>
      <text:p text:style-name="P9"><text:s text:c="6"/>*X3/b41,X6/A17</text:p>
      <text:p text:style-name="P9"><text:soft-page-break/><text:s text:c="6"/>*X3/a42,X6/A18</text:p>
      <text:p text:style-name="P9"><text:s text:c="6"/>*X3/b42,X6/A19</text:p>
      <text:p text:style-name="P9"/>
      <text:p text:style-name="P9"/>
      <text:p text:style-name="P9"><text:s text:c="6"/>*X3/C34,X6/Б2</text:p>
      <text:p text:style-name="P9"><text:s text:c="6"/>*X3/D34,X6/Б3</text:p>
      <text:p text:style-name="P9"><text:s text:c="6"/>*X3/C35,X6/Б4</text:p>
      <text:p text:style-name="P9"><text:s text:c="6"/>*X3/D35,X6/Б5</text:p>
      <text:p text:style-name="P9"><text:s text:c="6"/>*X3/C36,X6/Б6</text:p>
      <text:p text:style-name="P9"><text:s text:c="6"/>*X3/D36,X6/Б7</text:p>
      <text:p text:style-name="P9"><text:s text:c="6"/>*X3/C37,X6/Б8</text:p>
      <text:p text:style-name="P9"><text:s text:c="6"/>*X3/D37,X6/Б9</text:p>
      <text:p text:style-name="P9"><text:s text:c="6"/>*X3/D38,X6/Б12</text:p>
      <text:p text:style-name="P9"><text:s text:c="6"/>*X3/C39,X6/Б13</text:p>
      <text:p text:style-name="P9"><text:s text:c="6"/>*X3/D39,X6/Б14</text:p>
      <text:p text:style-name="P9"><text:s text:c="6"/>*X3/C40,X6/Б15</text:p>
      <text:p text:style-name="P9"><text:s text:c="6"/>*X3/D40,X6/Б16</text:p>
      <text:p text:style-name="P9"><text:s text:c="6"/>*X3/D41,X6/Б17</text:p>
      <text:p text:style-name="P9"><text:s text:c="6"/>*X3/C42,X6/Б18</text:p>
      <text:p text:style-name="P9"><text:s text:c="6"/>*X3/D42,X6/Б19</text:p>
      <text:p text:style-name="P9"><text:s text:c="6"/>*X3/B38,X6/A11</text:p>
      <text:p text:style-name="P9"><text:s text:c="6"/>*X3/A43,X6/A20</text:p>
      <text:p text:style-name="P9"><text:s text:c="6"/>*X3/C38,X6/Б10</text:p>
      <text:p text:style-name="P9"><text:s text:c="6"/>*X3/C43,X6/Б20*</text:p>
      <text:p text:style-name="P9"/>
      <text:p text:style-name="P9">50 ЦУ Проверку прочности и сопротивления изоляции</text:p>
      <text:p text:style-name="P9"><text:s text:c="7"/>цепей кабеля ИМНЕ.685611.219 проводить в соответствии</text:p>
      <text:p text:style-name="P9"><text:s text:c="7"/>с <text:s/>п.2.2.3 (табл.2),</text:p>
      <text:p text:style-name="P9"><text:s text:c="10"/>п.2.2.4 и п.4.2.4(табл.9б),</text:p>
      <text:p text:style-name="P9"><text:s text:c="10"/>п.4.2.3(табл.8) <text:s text:c="13"/>ХД0.005.081ТУ</text:p>
      <text:p text:style-name="P9"/>
      <text:p text:style-name="P9">55 СИ R&gt;50МОм,250В,С,П</text:p>
      <text:p text:style-name="P9"/>
      <text:p text:style-name="P9">60 ЦУ Проверять Пробой?</text:p>
      <text:p text:style-name="P9"/>
      <text:p text:style-name="P9">65 УП 140 <text:s text:c="2"/>// Если не проверяем Пробой <text:s/>- идем на конец программы</text:p>
      <text:p text:style-name="P9"/>
      <text:p text:style-name="P9">70 ЦУ Проверка Прочности изоляции: по ИМНЕ.685611.219ТБ</text:p>
      <text:p text:style-name="P9"/>
      <text:p text:style-name="P9">75 <text:s/>ПИ R&gt;50МОм,250В <text:s/>175В,1c</text:p>
      <text:p text:style-name="P9"><text:s text:c="7"/>*X1/A2-*A44*X1/A46-*A49*X1/A52-*A53*X1/A55</text:p>
      <text:p text:style-name="P9"><text:s text:c="7"/>*X1/B1*X1/B3-*B5*X1/B7-*B15*X1/B17-*B25</text:p>
      <text:p text:style-name="P9"><text:s text:c="4"/>*X1/B27-*B32*X1/B34-*B35*X1/B37-*B45*X1/B47-*B49</text:p>
      <text:p text:style-name="P9"><text:s text:c="4"/>*X1/C2-*C10*X1/C12-*C20*X1/C22-*C30*X1/C32-*C40</text:p>
      <text:p text:style-name="P9"><text:s text:c="4"/>*X1/C42-*C43 *X1/C46-*C50*X1/C53-*C54</text:p>
      <text:p text:style-name="P9"><text:s text:c="4"/>*X1/D1*X1/D3-*D42*X1/D45-*D51*X1/D53-*D54*X1/A1 *корпус*</text:p>
      <text:p text:style-name="P9"/>
      <text:p text:style-name="P9">80 ПИ R&gt;50МОм,250В <text:s/>175В,1c</text:p>
      <text:p text:style-name="P9"><text:s text:c="7"/>*X2/a2*X2/a34-*A44*X2/a46*X2/a52-*A53*X2/a55</text:p>
      <text:p text:style-name="P9"><text:s text:c="8"/>*X2/B34-*B35*X2/B37-*B45*X2/B52</text:p>
      <text:p text:style-name="P9"><text:s text:c="8"/>*X2/C2*X2/C34-*C40*X2/C42-*C43</text:p>
      <text:p text:style-name="P9"><text:s text:c="8"/>*X2/D34-*D42*X2/D45*X2/D50-*D51*X2/D53</text:p>
      <text:p text:style-name="P9"><text:s text:c="4"/>*X2/A1 *корпус*</text:p>
      <text:p text:style-name="P9"><text:soft-page-break/></text:p>
      <text:p text:style-name="P9">85 ПИ R&gt;50МОм,250В <text:s/>175В,1c</text:p>
      <text:p text:style-name="P9"><text:s text:c="7"/>*X3/a2*X3/a34-*A44*X3/a46*X3/a52-*A53*X3/a55</text:p>
      <text:p text:style-name="P9"><text:s text:c="8"/>*X3/B34-*B35*X3/B37-*B45*X3/B52</text:p>
      <text:p text:style-name="P9"><text:s text:c="8"/>*X3/C2*X3/C34-*C40*X3/C42-*C43</text:p>
      <text:p text:style-name="P9"><text:s text:c="8"/>*X3/D34-*D42*X3/D45*X3/D50-*D51*X3/D53</text:p>
      <text:p text:style-name="P9"><text:s text:c="4"/>*X3/A1 *корпус*</text:p>
      <text:p text:style-name="P9"/>
      <text:p text:style-name="P9">90 ЦУ Проверка кабеля ИМНЕ.685611.219 после сборки?</text:p>
      <text:p text:style-name="P9"/>
      <text:p text:style-name="P9">91 УП 140 <text:s text:c="2"/>// Если не проверяем <text:s/>- идем на конец программы</text:p>
      <text:p text:style-name="P9"/>
      <text:p text:style-name="P9">95 <text:s/>ПР R&lt;10 Ом,C</text:p>
      <text:p text:style-name="P9"><text:s text:c="6"/>*X1/A1,X2/A1,X3/A1,X1/A56,X2/A56,X3/A56, <text:s/>КОРПУС</text:p>
      <text:p text:style-name="P9"/>
      <text:p text:style-name="P9"><text:s text:c="6"/>*X1/B1,X1/B6,X1/B16,X1/B26,X1/B36,X1/B46,X1/B56,{1}</text:p>
      <text:p text:style-name="P9"><text:s text:c="7"/>X2/B1,X2/B6,X2/B16,X2/B26,X2/B36,X2/B46,X2/B56,</text:p>
      <text:p text:style-name="P9"><text:s text:c="7"/>X3/B1,X3/B6,X3/B16,X3/B26,X3/B36,X3/B46,X3/B56,</text:p>
      <text:p text:style-name="P9"><text:s text:c="7"/>X4/Б1,X4/Б11,X4/Б21,X4/Б31,</text:p>
      <text:p text:style-name="P9"><text:s text:c="7"/>X5/Б1,X5/Б11,X5/Б21,X5/Б31,</text:p>
      <text:p text:style-name="P9"><text:s text:c="7"/>X6/Б1,X6/Б11,X6/Б21,X6/Б31,</text:p>
      <text:p text:style-name="P9"><text:s text:c="6"/>X1/C1,X1/C11,X1/C21,X1/C31,X1/C41,X1/C51,X1/C56,{2}</text:p>
      <text:p text:style-name="P9"><text:s text:c="7"/>X1/C55,X1/D55,</text:p>
      <text:p text:style-name="P9"><text:s text:c="6"/>X2/C1,X2/C11,X2/C21,X2/C31,X2/C41,X2/C51,X2/C56,{2}</text:p>
      <text:p text:style-name="P9"><text:s text:c="7"/>X2/C55,X2/D55,</text:p>
      <text:p text:style-name="P9"><text:s text:c="6"/>X3/C1,X3/C11,X3/C21,X3/C31,X3/C41,X3/C51,X3/C56,{2}</text:p>
      <text:p text:style-name="P9"><text:s text:c="7"/>X3/C55,X3/D55</text:p>
      <text:p text:style-name="P9"/>
      <text:p text:style-name="P9"><text:s text:c="6"/>*X1/A3,X2/A3,X3/A3</text:p>
      <text:p text:style-name="P9"><text:s text:c="6"/>*X1/B3,X2/B3,X3/B3</text:p>
      <text:p text:style-name="P9"><text:s text:c="6"/>*X1/A4,X2/A4,X3/A4</text:p>
      <text:p text:style-name="P9"><text:s text:c="6"/>*X1/B4,X2/B4,X3/B4</text:p>
      <text:p text:style-name="P9"><text:s text:c="6"/>*X1/A5,X2/A5,X3/A5</text:p>
      <text:p text:style-name="P9"><text:s text:c="6"/>*X1/B5,X2/B5,X3/B5</text:p>
      <text:p text:style-name="P9"><text:s text:c="6"/>*X1/A6,X2/A6,X3/A6</text:p>
      <text:p text:style-name="P9"><text:s text:c="6"/>*X1/A7,X2/A7,X3/A7</text:p>
      <text:p text:style-name="P9"><text:s text:c="6"/>*X1/B7,X2/B7,X3/B7</text:p>
      <text:p text:style-name="P9"><text:s text:c="6"/>*X1/A8,X2/A8,X3/A8</text:p>
      <text:p text:style-name="P9"><text:s text:c="6"/>*X1/B8,X2/B8,X3/B8</text:p>
      <text:p text:style-name="P9"><text:s text:c="6"/>*X1/A9,X2/A9,X3/A9</text:p>
      <text:p text:style-name="P9"><text:s text:c="6"/>*X1/B9,X2/B9,X3/B9</text:p>
      <text:p text:style-name="P9"><text:s text:c="6"/>*X1/A10,X2/A10,X3/A10</text:p>
      <text:p text:style-name="P9"><text:s text:c="6"/>*X1/B10,X2/B10,X3/B10</text:p>
      <text:p text:style-name="P9"><text:s text:c="6"/>*X1/A11,X2/A11,X3/A11</text:p>
      <text:p text:style-name="P9"><text:s text:c="6"/>*X1/B11,X2/B11,X3/B11</text:p>
      <text:p text:style-name="P9"><text:s text:c="6"/>*X1/A12,X2/A12,X3/A12</text:p>
      <text:p text:style-name="P9"/>
      <text:p text:style-name="P9"/>
      <text:p text:style-name="P9"><text:s text:c="6"/>*X1/D1,X1/D56</text:p>
      <text:p text:style-name="P9"><text:s text:c="6"/>*X2/D1,X2/D56</text:p>
      <text:p text:style-name="P9"><text:s text:c="6"/>*X3/D1,X3/D56</text:p>
      <text:p text:style-name="P9"/>
      <text:p text:style-name="P9"><text:s text:c="6"/>*X1/C3,X2/C3,X3/C3</text:p>
      <text:p text:style-name="P9"><text:soft-page-break/><text:s text:c="6"/>*X1/D3,X2/D3,X3/D3</text:p>
      <text:p text:style-name="P9"><text:s text:c="6"/>*X1/C4,X2/C4,X3/C4</text:p>
      <text:p text:style-name="P9"><text:s text:c="6"/>*X1/D4,X2/D4,X3/D4</text:p>
      <text:p text:style-name="P9"><text:s text:c="6"/>*X1/C5,X2/C5,X3/C5</text:p>
      <text:p text:style-name="P9"><text:s text:c="6"/>*X1/D5,X2/D5,X3/D5</text:p>
      <text:p text:style-name="P9"><text:s text:c="6"/>*X1/C6,X2/C6,X3/C6</text:p>
      <text:p text:style-name="P9"><text:s text:c="6"/>*X1/D6,X2/D6,X3/D6</text:p>
      <text:p text:style-name="P9"><text:s text:c="6"/>*X1/C7,X2/C7,X3/C7</text:p>
      <text:p text:style-name="P9"><text:s text:c="6"/>*X1/D7,X2/D7,X3/D7</text:p>
      <text:p text:style-name="P9"><text:s text:c="6"/>*X1/C8,X2/C8,X3/C8</text:p>
      <text:p text:style-name="P9"><text:s text:c="6"/>*X1/D8,X2/D8,X3/D8</text:p>
      <text:p text:style-name="P9"><text:s text:c="6"/>*X1/C9,X2/C9,X3/C9</text:p>
      <text:p text:style-name="P9"><text:s text:c="6"/>*X1/D9,X2/D9,X3/D9</text:p>
      <text:p text:style-name="P9"><text:s text:c="6"/>*X1/C10,X2/C10,X3/C10</text:p>
      <text:p text:style-name="P9"><text:s text:c="6"/>*X1/D10,X2/D10,X3/D10</text:p>
      <text:p text:style-name="P9"><text:s text:c="6"/>*X1/D11,X2/D11,X3/D11</text:p>
      <text:p text:style-name="P9"><text:s text:c="6"/>*X1/C12,X2/C12,X3/C12</text:p>
      <text:p text:style-name="P9"/>
      <text:p text:style-name="P9">{ЛИСТ 2}</text:p>
      <text:p text:style-name="P9"><text:s text:c="6"/>*X1/B12,X2/B12,X3/B12</text:p>
      <text:p text:style-name="P9"><text:s text:c="6"/>*X1/A13,X2/A13,X3/A13</text:p>
      <text:p text:style-name="P9"><text:s text:c="6"/>*X1/B13,X2/B13,X3/B13</text:p>
      <text:p text:style-name="P9"><text:s text:c="6"/>*X1/A14,X2/A14,X3/A14</text:p>
      <text:p text:style-name="P9"><text:s text:c="6"/>*X1/B14,X2/B14,X3/B14</text:p>
      <text:p text:style-name="P9"><text:s text:c="6"/>*X1/A15,X2/A15,X3/A15</text:p>
      <text:p text:style-name="P9"><text:s text:c="6"/>*X1/B15,X2/B15,X3/B15</text:p>
      <text:p text:style-name="P9"><text:s text:c="6"/>*X1/A16,X2/A16,X3/A16</text:p>
      <text:p text:style-name="P9"><text:s text:c="6"/>*X1/A17,X2/A17,X3/A17</text:p>
      <text:p text:style-name="P9"><text:s text:c="6"/>*X1/B17,X2/B17,X3/B17</text:p>
      <text:p text:style-name="P9"><text:s text:c="6"/>*X1/A18,X2/A18,X3/A18</text:p>
      <text:p text:style-name="P9"><text:s text:c="6"/>*X1/B18,X2/B18,X3/B18</text:p>
      <text:p text:style-name="P9"><text:s text:c="6"/>*X1/A19,X2/A19,X3/A19</text:p>
      <text:p text:style-name="P9"><text:s text:c="6"/>*X1/B19,X2/B19,X3/B19</text:p>
      <text:p text:style-name="P9"><text:s text:c="6"/>*X1/A20,X2/A20,X3/A20</text:p>
      <text:p text:style-name="P9"><text:s text:c="6"/>*X1/B20,X2/B20,X3/B20</text:p>
      <text:p text:style-name="P9"><text:s text:c="6"/>*X1/A21,X2/A21,X3/A21</text:p>
      <text:p text:style-name="P9"><text:s text:c="6"/>*X1/B21,X2/B21,X3/B21</text:p>
      <text:p text:style-name="P9"><text:s text:c="6"/>*X1/A22,X2/A22,X3/A22</text:p>
      <text:p text:style-name="P9"><text:s text:c="6"/>*X1/B22,X2/B22,X3/B22</text:p>
      <text:p text:style-name="P9"><text:s text:c="6"/>*X1/A23,X2/A23,X3/A23</text:p>
      <text:p text:style-name="P9"><text:s text:c="6"/>*X1/B23,X2/B23,X3/B23</text:p>
      <text:p text:style-name="P9"><text:s text:c="6"/>*X1/A24,X2/A24,X3/A24</text:p>
      <text:p text:style-name="P9"><text:s text:c="6"/>*X1/B24,X2/B24,X3/B24</text:p>
      <text:p text:style-name="P9"><text:s text:c="6"/>*X1/A25,X2/A25,X3/A25</text:p>
      <text:p text:style-name="P9"><text:s text:c="6"/>*X1/B25,X2/B25,X3/B25</text:p>
      <text:p text:style-name="P9"><text:s text:c="6"/>*X1/A26,X2/A26,X3/A26</text:p>
      <text:p text:style-name="P9"><text:s text:c="6"/>*X1/A27,X2/A27,X3/A27</text:p>
      <text:p text:style-name="P9"/>
      <text:p text:style-name="P9"><text:s text:c="6"/>*X1/D12,X2/D12,X3/D12</text:p>
      <text:p text:style-name="P9"><text:s text:c="6"/>*X1/С13,X2/C13,X3/C13</text:p>
      <text:p text:style-name="P9"><text:s text:c="6"/>*X1/D13,X2/D13,X3/D13</text:p>
      <text:p text:style-name="P9"><text:s text:c="6"/>*X1/C14,X2/C14,X3/C14</text:p>
      <text:p text:style-name="P9"><text:s text:c="6"/>*X1/D14,X2/D14,X3/D14</text:p>
      <text:p text:style-name="P9"><text:soft-page-break/><text:s text:c="6"/>*X1/C15,X2/C15,X3/C15</text:p>
      <text:p text:style-name="P9"><text:s text:c="6"/>*X1/D15,X2/D15,X3/D15</text:p>
      <text:p text:style-name="P9"><text:s text:c="6"/>*X1/C16,X2/C16,X3/C16</text:p>
      <text:p text:style-name="P9"><text:s text:c="6"/>*X1/D16,X2/D16,X3/D16</text:p>
      <text:p text:style-name="P9"><text:s text:c="6"/>*X1/C17,X2/C17,X3/C17</text:p>
      <text:p text:style-name="P9"><text:s text:c="6"/>*X1/D17,X2/D17,X3/D17</text:p>
      <text:p text:style-name="P9"><text:s text:c="6"/>*X1/C18,X2/C18,X3/C18</text:p>
      <text:p text:style-name="P9"><text:s text:c="6"/>*X1/D18,X2/D18,X3/D18</text:p>
      <text:p text:style-name="P9"><text:s text:c="6"/>*X1/C19,X2/C19,X3/C19</text:p>
      <text:p text:style-name="P9"><text:s text:c="6"/>*X1/D19,X2/D19,X3/D19</text:p>
      <text:p text:style-name="P9"><text:s text:c="6"/>*X1/C20,X2/C20,X3/C20</text:p>
      <text:p text:style-name="P9"><text:s text:c="6"/>*X1/D20,X2/D20,X3/D20</text:p>
      <text:p text:style-name="P9"><text:s text:c="6"/>*X1/D21,X2/D21,X3/D21</text:p>
      <text:p text:style-name="P9"><text:s text:c="6"/>*X1/C22,X2/C22,X3/C22</text:p>
      <text:p text:style-name="P9"><text:s text:c="6"/>*X1/D22,X2/D22,X3/D22</text:p>
      <text:p text:style-name="P9"><text:s text:c="6"/>*X1/C23,X2/C23,X3/C23</text:p>
      <text:p text:style-name="P9"><text:s text:c="6"/>*X1/D23,X2/D23,X3/D23</text:p>
      <text:p text:style-name="P9"><text:s text:c="6"/>*X1/C24,X2/C24,X3/C24</text:p>
      <text:p text:style-name="P9"><text:s text:c="6"/>*X1/D24,X2/D24,X3/D24</text:p>
      <text:p text:style-name="P9"><text:s text:c="6"/>*X1/C25,X2/C25,X3/C25</text:p>
      <text:p text:style-name="P9"><text:s text:c="6"/>*X1/D25,X2/D25,X3/D25</text:p>
      <text:p text:style-name="P9"><text:s text:c="6"/>*X1/C26,X2/C26,X3/C26</text:p>
      <text:p text:style-name="P9"><text:s text:c="6"/>*X1/D26,X2/D26,X3/D26</text:p>
      <text:p text:style-name="P9"/>
      <text:p text:style-name="P9">{ЛИСТ 3}</text:p>
      <text:p text:style-name="P9"/>
      <text:p text:style-name="P9"><text:s text:c="6"/>*X1/B27,X2/B27,X3/B27</text:p>
      <text:p text:style-name="P9"><text:s text:c="6"/>*X1/A28,X2/A28,X3/A28</text:p>
      <text:p text:style-name="P9"><text:s text:c="6"/>*X1/B28,X2/B28,X3/B28</text:p>
      <text:p text:style-name="P9"><text:s text:c="6"/>*X1/A29,X2/A29,X3/A29</text:p>
      <text:p text:style-name="P9"><text:s text:c="6"/>*X1/B29,X2/B29,X3/B29</text:p>
      <text:p text:style-name="P9"><text:s text:c="6"/>*X1/A30,X2/A30,X3/A30</text:p>
      <text:p text:style-name="P9"><text:s text:c="6"/>*X1/B30,X2/B30,X3/B30</text:p>
      <text:p text:style-name="P9"><text:s text:c="6"/>*X1/A31,X2/A31,X3/A31</text:p>
      <text:p text:style-name="P9"><text:s text:c="6"/>*X1/B31,X2/B31,X3/B31</text:p>
      <text:p text:style-name="P9"><text:s text:c="6"/>*X1/A32,X2/A32,X3/A32</text:p>
      <text:p text:style-name="P9"><text:s text:c="6"/>*X1/B32,X2/B32,X3/B32</text:p>
      <text:p text:style-name="P9"><text:s text:c="6"/>*X1/A33,X2/A33,X3/A33</text:p>
      <text:p text:style-name="P9"/>
      <text:p text:style-name="P9"><text:s text:c="6"/>*X4/A1,X1/A2</text:p>
      <text:p text:style-name="P9"><text:s text:c="6"/>*X4/A2,X1/C2</text:p>
      <text:p text:style-name="P9"><text:s text:c="6"/>*X4/A30,X1/A55</text:p>
      <text:p text:style-name="P9"><text:s text:c="6"/>*X4/A29,X1/D51</text:p>
      <text:p text:style-name="P9"/>
      <text:p text:style-name="P9"><text:s text:c="6"/>*X5/A1,X2/A2</text:p>
      <text:p text:style-name="P9"><text:s text:c="6"/>*X5/A2,X2/C2</text:p>
      <text:p text:style-name="P9"><text:s text:c="6"/>*X5/A30,X2/A55</text:p>
      <text:p text:style-name="P9"><text:s text:c="6"/>*X5/A29,X2/D51</text:p>
      <text:p text:style-name="P9"/>
      <text:p text:style-name="P9"><text:s text:c="6"/>*X6/A1,X3/A2</text:p>
      <text:p text:style-name="P9"><text:s text:c="6"/>*X6/A2,X3/C2</text:p>
      <text:p text:style-name="P9"><text:s text:c="6"/>*X6/A30,X3/A55</text:p>
      <text:p text:style-name="P9"><text:s text:c="6"/>*X6/A29,X3/D51</text:p>
      <text:p text:style-name="P9"><text:soft-page-break/></text:p>
      <text:p text:style-name="P9"><text:s text:c="6"/>*X1/С27,X2/C27,X3/C27</text:p>
      <text:p text:style-name="P9"><text:s text:c="6"/>*X1/D27,X2/D27,X3/D27</text:p>
      <text:p text:style-name="P9"><text:s text:c="6"/>*X1/C28,X2/C28,X3/C28</text:p>
      <text:p text:style-name="P9"><text:s text:c="6"/>*X1/D28,X2/D28,X3/D28</text:p>
      <text:p text:style-name="P9"><text:s text:c="6"/>*X1/C29,X2/C29,X3/C29</text:p>
      <text:p text:style-name="P9"><text:s text:c="6"/>*X1/D29,X2/D29,X3/D29</text:p>
      <text:p text:style-name="P9"><text:s text:c="6"/>*X1/C30,X2/C30,X3/C30</text:p>
      <text:p text:style-name="P9"><text:s text:c="6"/>*X1/D30,X2/D30,X3/D30</text:p>
      <text:p text:style-name="P9"><text:s text:c="6"/>*X1/D31,X2/D31,X3/D31</text:p>
      <text:p text:style-name="P9"><text:s text:c="6"/>*X1/C32,X2/C32,X3/C32</text:p>
      <text:p text:style-name="P9"><text:s text:c="6"/>*X1/D32,X2/D32,X3/D32</text:p>
      <text:p text:style-name="P9"><text:s text:c="6"/>*X1/C33,X2/C33,X3/C33</text:p>
      <text:p text:style-name="P9"><text:s text:c="6"/>*X1/D33,X2/D33,X3/D33</text:p>
      <text:p text:style-name="P9"><text:s text:c="6"/>*X1/C46,X2/C46,X3/C46</text:p>
      <text:p text:style-name="P9"><text:s text:c="6"/>*X1/D46,X2/D46,X3/D46</text:p>
      <text:p text:style-name="P9"><text:s text:c="6"/>*X1/C47,X2/C47,X3/C47</text:p>
      <text:p text:style-name="P9"><text:s text:c="6"/>*X1/D47,X2/D47,X3/D47</text:p>
      <text:p text:style-name="P9"><text:s text:c="6"/>*X1/C48,X2/C48,X3/C48</text:p>
      <text:p text:style-name="P9"><text:s text:c="6"/>*X1/D48,X2/D48,X3/D48</text:p>
      <text:p text:style-name="P9"><text:s text:c="6"/>*X1/C49,X2/C49,X3/C49</text:p>
      <text:p text:style-name="P9"><text:s text:c="6"/>*X1/D49,X2/D49,X3/D49</text:p>
      <text:p text:style-name="P9"><text:s text:c="6"/>*X1/C50,X2/C50,X3/C50</text:p>
      <text:p text:style-name="P9"><text:s text:c="6"/>*X1/D50,X2/D50,X3/D50,X4/A27,X5/A27,X6/A27</text:p>
      <text:p text:style-name="P9"><text:s text:c="6"/>*X1/D54,X2/D54,X3/D54</text:p>
      <text:p text:style-name="P9"><text:s text:c="6"/>*X1/C54,X2/C54,X3/C54</text:p>
      <text:p text:style-name="P9"><text:s text:c="6"/>*X1/C53,X2/C53,X3/C53</text:p>
      <text:p text:style-name="P9"/>
      <text:p text:style-name="P9">{ЛИСТ 4}</text:p>
      <text:p text:style-name="P9"/>
      <text:p text:style-name="P9"><text:s text:c="6"/>*X1/A47,X2/A47,X3/A47,X4/Б22,X5/Б22,X6/Б22</text:p>
      <text:p text:style-name="P9"><text:s text:c="6"/>*X1/B47,X2/B47,X3/B47,X4/Б23,X5/Б23,X6/Б23</text:p>
      <text:p text:style-name="P9"><text:s text:c="6"/>*X1/A48,X2/A48,X3/A48,X4/Б24,X5/Б24,X6/Б24</text:p>
      <text:p text:style-name="P9"><text:s text:c="6"/>*X1/B48,X2/B48,X3/B48,X4/Б25,X5/Б25,X6/Б25</text:p>
      <text:p text:style-name="P9"><text:s text:c="6"/>*X1/A49,X2/A49,X3/A49,X4/Б26,X5/Б26,X6/Б26</text:p>
      <text:p text:style-name="P9"><text:s text:c="6"/>*X1/B49,X2/B49,X3/B49,X4/Б27,X5/Б27,X6/Б27</text:p>
      <text:p text:style-name="P9"/>
      <text:p text:style-name="P9"><text:s text:c="6"/>*X1/B43,X4/A21</text:p>
      <text:p text:style-name="P9"><text:s text:c="6"/>*X1/A44,X4/A22</text:p>
      <text:p text:style-name="P9"><text:s text:c="6"/>*X1/B44,X4/A23</text:p>
      <text:p text:style-name="P9"><text:s text:c="6"/>*X1/B45,X4/A24</text:p>
      <text:p text:style-name="P9"><text:s text:c="6"/>*X1/D45,X4/A25</text:p>
      <text:p text:style-name="P9"><text:s text:c="6"/>*X1/A46,X4/A26</text:p>
      <text:p text:style-name="P9"/>
      <text:p text:style-name="P9"><text:s text:c="6"/>*X1/D53,X4/A28</text:p>
      <text:p text:style-name="P9"><text:s text:c="6"/>*X1/A52,X4/Б28</text:p>
      <text:p text:style-name="P9"><text:s text:c="6"/>*X1/B52,X4/Б29</text:p>
      <text:p text:style-name="P9"><text:s text:c="6"/>*X1/A53,X4/Б30</text:p>
      <text:p text:style-name="P9"/>
      <text:p text:style-name="P9"><text:s text:c="6"/>*X2/B43,X5/A21</text:p>
      <text:p text:style-name="P9"><text:s text:c="6"/>*X2/A44,X5/A22</text:p>
      <text:p text:style-name="P9"><text:s text:c="6"/>*X2/B44,X5/A23</text:p>
      <text:p text:style-name="P9"><text:s text:c="6"/>*X2/B45,X5/A24</text:p>
      <text:p text:style-name="P9"><text:soft-page-break/><text:s text:c="6"/>*X2/D45,X5/A25</text:p>
      <text:p text:style-name="P9"><text:s text:c="6"/>*X2/A46,X5/A26</text:p>
      <text:p text:style-name="P9"/>
      <text:p text:style-name="P9"><text:s text:c="6"/>*X2/D53,X5/A28</text:p>
      <text:p text:style-name="P9"><text:s text:c="6"/>*X2/A52,X5/Б28</text:p>
      <text:p text:style-name="P9"><text:s text:c="6"/>*X2/B52,X5/Б29</text:p>
      <text:p text:style-name="P9"><text:s text:c="6"/>*X2/A53,X5/Б30</text:p>
      <text:p text:style-name="P9"/>
      <text:p text:style-name="P9"><text:s text:c="6"/>*X3/B43,X6/A21</text:p>
      <text:p text:style-name="P9"><text:s text:c="6"/>*X3/A44,X6/A22</text:p>
      <text:p text:style-name="P9"><text:s text:c="6"/>*X3/B44,X6/A23</text:p>
      <text:p text:style-name="P9"><text:s text:c="6"/>*X3/B45,X6/A24</text:p>
      <text:p text:style-name="P9"><text:s text:c="6"/>*X3/D45,X6/A25</text:p>
      <text:p text:style-name="P9"><text:s text:c="6"/>*X3/A46,X6/A26</text:p>
      <text:p text:style-name="P9"/>
      <text:p text:style-name="P9"><text:s text:c="6"/>*X3/D53,X6/A28</text:p>
      <text:p text:style-name="P9"><text:s text:c="6"/>*X3/A52,X6/Б28</text:p>
      <text:p text:style-name="P9"><text:s text:c="6"/>*X3/B52,X6/Б29</text:p>
      <text:p text:style-name="P9"><text:s text:c="6"/>*X3/A53,X6/Б30</text:p>
      <text:p text:style-name="P9"/>
      <text:p text:style-name="P9"><text:s text:c="6"/>*X1/A34,X4/A3</text:p>
      <text:p text:style-name="P9"><text:s text:c="6"/>*X1/B34,X4/A4</text:p>
      <text:p text:style-name="P9"><text:s text:c="6"/>*X1/A35,X4/A5</text:p>
      <text:p text:style-name="P9"><text:s text:c="6"/>*X1/B35,X4/A6</text:p>
      <text:p text:style-name="P9"><text:s text:c="6"/>*X1/A36,X4/A7</text:p>
      <text:p text:style-name="P9"><text:s text:c="6"/>*X1/A37,X4/A8</text:p>
      <text:p text:style-name="P9"><text:s text:c="6"/>*X1/B37,X4/A9</text:p>
      <text:p text:style-name="P9"><text:s text:c="6"/>*X1/A38,X4/A10</text:p>
      <text:p text:style-name="P9"><text:s text:c="6"/>*X1/a39,X4/A12</text:p>
      <text:p text:style-name="P9"><text:s text:c="6"/>*X1/b39,X4/A13</text:p>
      <text:p text:style-name="P9"><text:s text:c="6"/>*X1/a40,X4/A14</text:p>
      <text:p text:style-name="P9"><text:s text:c="6"/>*X1/b40,X4/A15</text:p>
      <text:p text:style-name="P9"><text:s text:c="6"/>*X1/a41,X4/A16</text:p>
      <text:p text:style-name="P9"><text:s text:c="6"/>*X1/b41,X4/A17</text:p>
      <text:p text:style-name="P9"><text:s text:c="6"/>*X1/a42,X4/A18</text:p>
      <text:p text:style-name="P9"><text:s text:c="6"/>*X1/b42,X4/A19</text:p>
      <text:p text:style-name="P9"><text:s text:c="6"/>*X1/C34,X4/Б2</text:p>
      <text:p text:style-name="P9"><text:s text:c="6"/>*X1/D34,X4/Б3</text:p>
      <text:p text:style-name="P9"><text:s text:c="6"/>*X1/C35,X4/Б4</text:p>
      <text:p text:style-name="P9"><text:s text:c="6"/>*X1/D35,X4/Б5</text:p>
      <text:p text:style-name="P9"><text:s text:c="6"/>*X1/C36,X4/Б6</text:p>
      <text:p text:style-name="P9"><text:s text:c="6"/>*X1/D36,X4/Б7</text:p>
      <text:p text:style-name="P9"><text:s text:c="6"/>*X1/C37,X4/Б8</text:p>
      <text:p text:style-name="P9"><text:s text:c="6"/>*X1/D37,X4/Б9</text:p>
      <text:p text:style-name="P9"><text:s text:c="6"/>*X1/D38,X4/Б12</text:p>
      <text:p text:style-name="P9"><text:s text:c="6"/>*X1/C39,X4/Б13</text:p>
      <text:p text:style-name="P9"><text:s text:c="6"/>*X1/D39,X4/Б14</text:p>
      <text:p text:style-name="P9"><text:s text:c="6"/>*X1/C40,X4/Б15</text:p>
      <text:p text:style-name="P9"><text:s text:c="6"/>*X1/D40,X4/Б16</text:p>
      <text:p text:style-name="P9"><text:s text:c="6"/>*X1/D41,X4/Б17</text:p>
      <text:p text:style-name="P9"><text:s text:c="6"/>*X1/C42,X4/Б18</text:p>
      <text:p text:style-name="P9"><text:s text:c="6"/>*X1/D42,X4/Б19</text:p>
      <text:p text:style-name="P9"><text:s text:c="6"/>*X1/B38,X4/A11</text:p>
      <text:p text:style-name="P9"><text:soft-page-break/><text:s text:c="6"/>*X1/A43,X4/A20</text:p>
      <text:p text:style-name="P9"><text:s text:c="6"/>*X1/C38,X4/Б10</text:p>
      <text:p text:style-name="P9"><text:s text:c="6"/>*X1/C43,X4/Б20</text:p>
      <text:p text:style-name="P9"/>
      <text:p text:style-name="P9"><text:s text:c="6"/>*X2/A34,X5/A3</text:p>
      <text:p text:style-name="P9"><text:s text:c="6"/>*X2/B34,X5/A4</text:p>
      <text:p text:style-name="P9"><text:s text:c="6"/>*X2/A35,X5/A5</text:p>
      <text:p text:style-name="P9"><text:s text:c="6"/>*X2/B35,X5/A6</text:p>
      <text:p text:style-name="P9"><text:s text:c="6"/>*X2/A36,X5/A7</text:p>
      <text:p text:style-name="P9"><text:s text:c="6"/>*X2/A37,X5/A8</text:p>
      <text:p text:style-name="P9"><text:s text:c="6"/>*X2/B37,X5/A9</text:p>
      <text:p text:style-name="P9"><text:s text:c="6"/>*X2/A38,X5/A10</text:p>
      <text:p text:style-name="P9"><text:s text:c="6"/>*X2/a39,X5/A12</text:p>
      <text:p text:style-name="P9"><text:s text:c="6"/>*X2/b39,X5/A13</text:p>
      <text:p text:style-name="P9"><text:s text:c="6"/>*X2/a40,X5/A14</text:p>
      <text:p text:style-name="P9"><text:s text:c="6"/>*X2/b40,X5/A15</text:p>
      <text:p text:style-name="P9"><text:s text:c="6"/>*X2/a41,X5/A16</text:p>
      <text:p text:style-name="P9"><text:s text:c="6"/>*X2/b41,X5/A17</text:p>
      <text:p text:style-name="P9"><text:s text:c="6"/>*X2/a42,X5/A18</text:p>
      <text:p text:style-name="P9"><text:s text:c="6"/>*X2/b42,X5/A19</text:p>
      <text:p text:style-name="P9"><text:s text:c="6"/>*X2/C34,X5/Б2</text:p>
      <text:p text:style-name="P9"><text:s text:c="6"/>*X2/D34,X5/Б3</text:p>
      <text:p text:style-name="P9"><text:s text:c="6"/>*X2/C35,X5/Б4</text:p>
      <text:p text:style-name="P9"><text:s text:c="6"/>*X2/D35,X5/Б5</text:p>
      <text:p text:style-name="P9"><text:s text:c="6"/>*X2/C36,X5/Б6</text:p>
      <text:p text:style-name="P9"><text:s text:c="6"/>*X2/D36,X5/Б7</text:p>
      <text:p text:style-name="P9"><text:s text:c="6"/>*X2/C37,X5/Б8</text:p>
      <text:p text:style-name="P9"><text:s text:c="6"/>*X2/D37,X5/Б9</text:p>
      <text:p text:style-name="P9"><text:s text:c="6"/>*X2/D38,X5/Б12</text:p>
      <text:p text:style-name="P9"><text:s text:c="6"/>*X2/C39,X5/Б13</text:p>
      <text:p text:style-name="P9"><text:s text:c="6"/>*X2/D39,X5/Б14</text:p>
      <text:p text:style-name="P9"><text:s text:c="6"/>*X2/C40,X5/Б15</text:p>
      <text:p text:style-name="P9"><text:s text:c="6"/>*X2/D40,X5/Б16</text:p>
      <text:p text:style-name="P9"><text:s text:c="6"/>*X2/D41,X5/Б17</text:p>
      <text:p text:style-name="P9"><text:s text:c="6"/>*X2/C42,X5/Б18</text:p>
      <text:p text:style-name="P9"><text:s text:c="6"/>*X2/D42,X5/Б19</text:p>
      <text:p text:style-name="P9"><text:s text:c="6"/>*X2/B38,X5/A11</text:p>
      <text:p text:style-name="P9"><text:s text:c="6"/>*X2/A43,X5/A20</text:p>
      <text:p text:style-name="P9"><text:s text:c="6"/>*X2/C38,X5/Б10</text:p>
      <text:p text:style-name="P9"><text:s text:c="6"/>*X2/C43,X5/Б20</text:p>
      <text:p text:style-name="P9"/>
      <text:p text:style-name="P9"/>
      <text:p text:style-name="P9"><text:s text:c="6"/>*X3/A34,X6/A3</text:p>
      <text:p text:style-name="P9"><text:s text:c="6"/>*X3/B34,X6/A4</text:p>
      <text:p text:style-name="P9"><text:s text:c="6"/>*X3/A35,X6/A5</text:p>
      <text:p text:style-name="P9"><text:s text:c="6"/>*X3/B35,X6/A6</text:p>
      <text:p text:style-name="P9"><text:s text:c="6"/>*X3/A36,X6/A7</text:p>
      <text:p text:style-name="P9"><text:s text:c="6"/>*X3/A37,X6/A8</text:p>
      <text:p text:style-name="P9"><text:s text:c="6"/>*X3/B37,X6/A9</text:p>
      <text:p text:style-name="P9"><text:s text:c="6"/>*X3/A38,X6/A10</text:p>
      <text:p text:style-name="P9"><text:s text:c="6"/>*X3/а39,X6/A12</text:p>
      <text:p text:style-name="P9"><text:s text:c="6"/>*X3/в39,X6/A13</text:p>
      <text:p text:style-name="P9"><text:s text:c="6"/>*X3/a40,X6/A14</text:p>
      <text:p text:style-name="P9"><text:soft-page-break/><text:s text:c="6"/>*X3/b40,X6/A15</text:p>
      <text:p text:style-name="P9"><text:s text:c="6"/>*X3/a41,X6/A16</text:p>
      <text:p text:style-name="P9"><text:s text:c="6"/>*X3/b41,X6/A17</text:p>
      <text:p text:style-name="P9"><text:s text:c="6"/>*X3/a42,X6/A18</text:p>
      <text:p text:style-name="P9"><text:s text:c="6"/>*X3/b42,X6/A19</text:p>
      <text:p text:style-name="P9"/>
      <text:p text:style-name="P9"/>
      <text:p text:style-name="P9"><text:s text:c="6"/>*X3/C34,X6/Б2</text:p>
      <text:p text:style-name="P9"><text:s text:c="6"/>*X3/D34,X6/Б3</text:p>
      <text:p text:style-name="P9"><text:s text:c="6"/>*X3/C35,X6/Б4</text:p>
      <text:p text:style-name="P9"><text:s text:c="6"/>*X3/D35,X6/Б5</text:p>
      <text:p text:style-name="P9"><text:s text:c="6"/>*X3/C36,X6/Б6</text:p>
      <text:p text:style-name="P9"><text:s text:c="6"/>*X3/D36,X6/Б7</text:p>
      <text:p text:style-name="P9"><text:s text:c="6"/>*X3/C37,X6/Б8</text:p>
      <text:p text:style-name="P9"><text:s text:c="6"/>*X3/D37,X6/Б9</text:p>
      <text:p text:style-name="P9"><text:s text:c="6"/>*X3/D38,X6/Б12</text:p>
      <text:p text:style-name="P9"><text:s text:c="6"/>*X3/C39,X6/Б13</text:p>
      <text:p text:style-name="P9"><text:s text:c="6"/>*X3/D39,X6/Б14</text:p>
      <text:p text:style-name="P9"><text:s text:c="6"/>*X3/C40,X6/Б15</text:p>
      <text:p text:style-name="P9"><text:s text:c="6"/>*X3/D40,X6/Б16</text:p>
      <text:p text:style-name="P9"><text:s text:c="6"/>*X3/D41,X6/Б17</text:p>
      <text:p text:style-name="P9"><text:s text:c="6"/>*X3/C42,X6/Б18</text:p>
      <text:p text:style-name="P9"><text:s text:c="6"/>*X3/D42,X6/Б19</text:p>
      <text:p text:style-name="P9"><text:s text:c="6"/>*X3/B38,X6/A11</text:p>
      <text:p text:style-name="P9"><text:s text:c="6"/>*X3/A43,X6/A20</text:p>
      <text:p text:style-name="P9"><text:s text:c="6"/>*X3/C38,X6/Б10</text:p>
      <text:p text:style-name="P9"><text:s text:c="6"/>*X3/C43,X6/Б20*</text:p>
      <text:p text:style-name="P9"/>
      <text:p text:style-name="P9">100 ЦУ Проверку прочности и сопротивления изоляции</text:p>
      <text:p text:style-name="P9"><text:s text:c="7"/>цепей кабеля ИМНЕ.685611.219-01 проводить в соответствии</text:p>
      <text:p text:style-name="P9"><text:s text:c="7"/>с <text:s/>п.2.2.3 (табл.2),</text:p>
      <text:p text:style-name="P9"><text:s text:c="10"/>п.2.2.4 и п.4.2.4(табл.9б),</text:p>
      <text:p text:style-name="P9"><text:s text:c="10"/>п.4.2.3(табл.8) <text:s text:c="13"/>ХД0.005.081ТУ</text:p>
      <text:p text:style-name="P9"/>
      <text:p text:style-name="P9">105 СИ R&gt;50МОм,250В,С,П</text:p>
      <text:p text:style-name="P9"/>
      <text:p text:style-name="P9">110 ЦУ Проверять Пробой?</text:p>
      <text:p text:style-name="P9"/>
      <text:p text:style-name="P9">115 УП 140 <text:s text:c="2"/>// Если не проверяем Пробой <text:s/>- идем на конец программы</text:p>
      <text:p text:style-name="P9"/>
      <text:p text:style-name="P9">120 ЦУ Проверка Прочности изоляции: по ИМНЕ.685611.219ТБ</text:p>
      <text:p text:style-name="P9"/>
      <text:p text:style-name="P9">125 ПИ R&gt;50МОм,250В <text:s/>175В,1c</text:p>
      <text:p text:style-name="P9"><text:s text:c="7"/>*X1/A2-*A44*X1/A46-*A49*X1/A52-*A53*X1/A55</text:p>
      <text:p text:style-name="P9"><text:s text:c="7"/>*X1/B1*X1/B3-*B5*X1/B7-*B15*X1/B17-*B25</text:p>
      <text:p text:style-name="P9"><text:s text:c="4"/>*X1/B27-*B32*X1/B34-*B35*X1/B37-*B45*X1/B47-*B49</text:p>
      <text:p text:style-name="P9"><text:s text:c="4"/>*X1/C2-*C10*X1/C12-*C20*X1/C22-*C30*X1/C32-*C40</text:p>
      <text:p text:style-name="P9"><text:s text:c="4"/>*X1/C42-*C43 *X1/C46-*C50*X1/C53-*C54</text:p>
      <text:p text:style-name="P9"><text:s text:c="4"/>*X1/D1*X1/D3-*D42*X1/D45-*D51*X1/D53-*D54*X1/A1 #корпус*</text:p>
      <text:p text:style-name="P9"/>
      <text:p text:style-name="P9">130 ПИ R&gt;50МОм,250В <text:s/>175В,1c</text:p>
      <text:p text:style-name="P9"><text:s text:c="7"/>*X2/a2*X2/a34-*A44*X2/a46*X2/a52-*A53*X2/a55</text:p>
      <text:p text:style-name="P9"><text:soft-page-break/><text:s text:c="8"/>*X2/B34-*B35*X2/B37-*B45*X2/B52</text:p>
      <text:p text:style-name="P9"><text:s text:c="8"/>*X2/C2*X2/C34-*C40*X2/C42-*C43</text:p>
      <text:p text:style-name="P9"><text:s text:c="8"/>*X2/D34-*D42*X2/D45*X2/D50-*D51*X2/D53</text:p>
      <text:p text:style-name="P9"><text:s text:c="4"/>*X2/A1 #корпус*</text:p>
      <text:p text:style-name="P9"/>
      <text:p text:style-name="P9">135 ПИ R&gt;50МОм,250В <text:s/>175В,1c</text:p>
      <text:p text:style-name="P9"><text:s text:c="7"/>*X3/a2*X3/a34-*A44*X3/a46*X3/a52-*A53*X3/a55</text:p>
      <text:p text:style-name="P9"><text:s text:c="8"/>*X3/B34-*B35*X3/B37-*B45*X3/B52</text:p>
      <text:p text:style-name="P9"><text:s text:c="8"/>*X3/C2*X3/C34-*C40*X3/C42-*C43</text:p>
      <text:p text:style-name="P9"><text:s text:c="8"/>*X3/D34-*D42*X3/D45*X3/D50-*D51*X3/D53</text:p>
      <text:p text:style-name="P9"><text:s text:c="4"/>*X3/A1 #корпус*</text:p>
      <text:p text:style-name="P9">140 КЦ</text:p>
      <text:p text:style-name="P9"><text:s text:c="8"/>{Конец программы контроля}</text:p>
      <text:p text:style-name="P9"><text:s text:c="8"/>{Разработал: Вавро Е.А. <text:s/>}</text:p>
      <text:p text:style-name="P9"><text:s text:c="8"/>{Проверил: <text:s text:c="2"/>Турова Т.М. }</text:p>
      <text:p text:style-name="P9"><text:s text:c="8"/>{Н.лаб: <text:s text:c="5"/>Торхов Е.Л. }</text:p>
      <text:p text:style-name="P9"><text:s text:c="8"/>{Утвердил: <text:s text:c="2"/>Шушков Н.В. 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5T10:39:50.109000000</meta:creation-date>
    <dc:date>2022-10-05T10:53:17.433000000</dc:date>
    <meta:editing-duration>PT9M13S</meta:editing-duration>
    <meta:editing-cycles>3</meta:editing-cycles>
    <meta:generator>LibreOffice/6.2.6.2$Windows_X86_64 LibreOffice_project/684e730861356e74889dfe6dbddd3562aae2e6ad</meta:generator>
    <meta:document-statistic meta:table-count="0" meta:image-count="0" meta:object-count="0" meta:page-count="16" meta:paragraph-count="726" meta:word-count="969" meta:character-count="19090" meta:non-whitespace-character-count="14384"/>
  </office:meta>
</office:document-meta>
</file>